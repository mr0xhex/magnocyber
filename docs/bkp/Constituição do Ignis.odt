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8pt" fo:font-weight="bold" officeooo:rsid="001dcb15" officeooo:paragraph-rsid="001dcb15" style:font-size-asian="18pt" style:font-weight-asian="bold" style:font-size-complex="18pt" style:font-weight-complex="bold"/>
    </style:style>
    <style:style style:name="P2" style:family="paragraph" style:parent-style-name="Quotations">
      <style:paragraph-properties fo:margin-left="0in" fo:text-indent="0in" style:auto-text-indent="false"/>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4pt" fo:font-weight="bold" officeooo:rsid="001e47fa" officeooo:paragraph-rsid="001e47fa" style:font-size-asian="14pt" style:font-weight-asian="bold" style:font-size-complex="14pt" style:font-weight-complex="bold"/>
    </style:style>
    <style:style style:name="P5" style:family="paragraph" style:parent-style-name="Standard">
      <style:text-properties officeooo:paragraph-rsid="001e47fa"/>
    </style:style>
    <style:style style:name="P6" style:family="paragraph" style:parent-style-name="Heading_20_1">
      <style:text-properties fo:font-size="14pt" fo:font-weight="bold" officeooo:rsid="001e47fa" officeooo:paragraph-rsid="001e47fa" style:font-size-asian="14pt" style:font-weight-asian="bold" style:font-size-complex="14pt" style:font-weight-complex="bold"/>
    </style:style>
    <style:style style:name="P7" style:family="paragraph" style:parent-style-name="Text_20_body">
      <style:text-properties fo:font-size="14pt" fo:font-weight="bold" officeooo:rsid="001e47fa" officeooo:paragraph-rsid="001e47fa" style:font-size-asian="14pt" style:font-weight-asian="bold" style:font-size-complex="14pt" style:font-weight-complex="bold"/>
    </style:style>
    <style:style style:name="P8" style:family="paragraph" style:parent-style-name="Text_20_body">
      <style:text-properties officeooo:rsid="001e47fa" style:font-size-asian="12pt"/>
    </style:style>
    <style:style style:name="P9" style:family="paragraph" style:parent-style-name="Heading_20_2">
      <style:paragraph-properties fo:margin-top="0in" fo:margin-bottom="0.0972in" style:contextual-spacing="false" fo:line-height="115%"/>
      <style:text-properties fo:font-size="12pt" fo:font-weight="normal" officeooo:rsid="001e47fa" style:font-size-asian="12pt" style:font-weight-asian="normal" style:font-size-complex="12pt" style:font-weight-complex="normal"/>
    </style:style>
    <style:style style:name="P10" style:family="paragraph" style:parent-style-name="Text_20_body">
      <style:text-properties fo:font-size="12pt" fo:font-weight="normal" officeooo:rsid="001e47fa" officeooo:paragraph-rsid="001e47fa" style:font-size-asian="12pt" style:font-weight-asian="normal" style:font-size-complex="12pt" style:font-weight-complex="normal"/>
    </style:style>
    <style:style style:name="P11" style:family="paragraph" style:parent-style-name="Text_20_body">
      <style:paragraph-properties fo:margin-left="0.4925in" fo:margin-top="0in" fo:margin-bottom="0.0972in" style:contextual-spacing="false" fo:line-height="115%" fo:text-indent="0in" style:auto-text-indent="false"/>
      <style:text-properties fo:font-size="12pt" fo:font-weight="normal" officeooo:rsid="001e47fa" style:font-size-asian="12pt" style:font-weight-asian="normal" style:font-size-complex="12pt" style:font-weight-complex="normal"/>
    </style:style>
    <style:style style:name="P12" style:family="paragraph" style:parent-style-name="Text_20_body">
      <style:paragraph-properties fo:margin-left="0.4925in" fo:text-indent="0in" style:auto-text-indent="false"/>
      <style:text-properties officeooo:rsid="001e47fa" style:font-size-asian="12pt"/>
    </style:style>
    <style:style style:name="P13" style:family="paragraph" style:parent-style-name="Quotations">
      <style:paragraph-properties fo:margin-top="0in" fo:margin-bottom="0.0972in" style:contextual-spacing="false" fo:line-height="115%"/>
      <style:text-properties fo:font-size="12pt" fo:font-weight="normal" officeooo:rsid="001e47fa" style:font-size-asian="12pt" style:font-weight-asian="normal" style:font-size-complex="12pt" style:font-weight-complex="normal"/>
    </style:style>
    <style:style style:name="P14" style:family="paragraph" style:parent-style-name="Standard">
      <style:text-properties fo:font-size="14pt" fo:font-weight="bold" officeooo:rsid="001f7af7" officeooo:paragraph-rsid="001f7af7" style:font-size-asian="14pt" style:font-weight-asian="bold" style:font-size-complex="14pt" style:font-weight-complex="bold"/>
    </style:style>
    <style:style style:name="P15" style:family="paragraph" style:parent-style-name="Standard">
      <style:text-properties fo:font-size="14pt" fo:font-weight="bold" officeooo:rsid="001e47fa" officeooo:paragraph-rsid="001f7af7" style:font-size-asian="14pt" style:font-weight-asian="bold" style:font-size-complex="14pt" style:font-weight-complex="bold"/>
    </style:style>
    <style:style style:name="P16" style:family="paragraph" style:parent-style-name="Text_20_body">
      <style:text-properties fo:font-size="14pt" fo:font-weight="normal" officeooo:rsid="001e47fa" style:font-size-asian="14pt" style:font-weight-asian="normal" style:font-size-complex="14pt" style:font-weight-complex="normal"/>
    </style:style>
    <style:style style:name="P17" style:family="paragraph" style:parent-style-name="Text_20_body" style:list-style-name="L1">
      <style:paragraph-properties fo:margin-top="0in" fo:margin-bottom="0in" style:contextual-spacing="false"/>
      <style:text-properties fo:font-size="14pt" fo:font-weight="bold" officeooo:rsid="001e47fa" style:font-size-asian="14pt" style:font-weight-asian="bold" style:font-size-complex="14pt" style:font-weight-complex="bold"/>
    </style:style>
    <style:style style:name="P18" style:family="paragraph" style:parent-style-name="Text_20_body" style:list-style-name="L1">
      <style:text-properties fo:font-size="14pt" fo:font-weight="bold" officeooo:rsid="001e47fa" style:font-size-asian="14pt" style:font-weight-asian="bold" style:font-size-complex="14pt" style:font-weight-complex="bold"/>
    </style:style>
    <style:style style:name="P19" style:family="paragraph" style:parent-style-name="Text_20_body">
      <style:paragraph-properties fo:margin-left="0.4925in" fo:text-indent="0in" style:auto-text-indent="false"/>
      <style:text-properties fo:font-size="14pt" fo:font-weight="normal" officeooo:rsid="001e47fa" style:font-size-asian="14pt" style:font-weight-asian="normal" style:font-size-complex="14pt" style:font-weight-complex="normal"/>
    </style:style>
    <style:style style:name="P20" style:family="paragraph" style:parent-style-name="Text_20_body">
      <style:paragraph-properties fo:margin-left="0.4925in" fo:text-indent="0in" style:auto-text-indent="false"/>
      <style:text-properties fo:font-size="14pt" fo:font-weight="bold" officeooo:rsid="001e47fa" style:font-size-asian="14pt" style:font-weight-asian="bold" style:font-size-complex="14pt" style:font-weight-complex="bold"/>
    </style:style>
    <style:style style:name="P21" style:family="paragraph" style:parent-style-name="Standard">
      <style:text-properties fo:font-size="14pt" fo:font-weight="normal" officeooo:rsid="001e47fa" officeooo:paragraph-rsid="001f7af7" style:font-size-asian="14pt" style:font-weight-asian="normal" style:font-size-complex="14pt" style:font-weight-complex="normal"/>
    </style:style>
    <style:style style:name="T1" style:family="text">
      <style:text-properties fo:font-size="14pt" style:font-size-asian="14pt" style:font-size-complex="14pt"/>
    </style:style>
    <style:style style:name="T2" style:family="text">
      <style:text-properties fo:font-weight="normal" style:font-weight-asian="normal"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1e47fa" style:font-size-asian="14pt" style:font-weight-asian="bold" style:font-size-complex="14pt"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gnis Framework</text:p>
      <text:p text:style-name="Standard"><text:span text:style-name="Strong_20_Emphasis"/></text:p>
      <text:h text:style-name="Heading_20_2" text:outline-level="2"><text:span text:style-name="Strong_20_Emphasis"><text:span text:style-name="T1">Definição</text:span></text:span></text:h>
      <text:p text:style-name="P2"><text:span text:style-name="Strong_20_Emphasis"><text:span text:style-name="T2"><text:tab/>Ignis é uma plataforma inteligente de Offensive Security, orientada por IA, projetada para <text:tab/>conduzir avaliações de segurança de forma investigativa, reproduzindo o raciocínio de um <text:tab/>analista experiente, mantendo controle, rastreabilidade e geração automática de <text:tab/>evidências.</text:span></text:span></text:p>
      <text:p text:style-name="Standard"><text:span text:style-name="Strong_20_Emphasis"><text:span text:style-name="T2"/></text:span></text:p>
      <text:p text:style-name="P3">Missão</text:p>
      <text:p text:style-name="Standard"><text:span text:style-name="T3"><text:tab/></text:span>Automatizar o processo investigativo em Offensive Security, reduzindo o trabalho operacional e <text:tab/>ampliando a capacidade analítica do profissional de segurança.</text:p>
      <text:p text:style-name="Standard"/>
      <text:p text:style-name="Standard"/>
      <text:p text:style-name="P4">Visão</text:p>
      <text:p text:style-name="P5"><text:span text:style-name="T4"><text:tab/></text:span>Tornar-se a principal plataforma de Offensive Security orientada por Inteligência Artificial, <text:tab/>unificando investigação, execução, validação e documentação em um único ecossistema.</text:p>
      <text:p text:style-name="P5"/>
      <text:h text:style-name="P6" text:outline-level="1">Constituição Arquitetural do Ignis</text:h>
      <text:p text:style-name="P7"/>
      <text:p text:style-name="P8"><text:tab/>A Constituição Arquitetural do Ignis estabelece os princípios permanentes que regem a c<text:tab/>oncepção, a implementação e a evolução da plataforma.</text:p>
      <text:p text:style-name="P8"><text:tab/>Esses princípios representam a autoridade máxima de decisão arquitetural do projeto e deverão <text:tab/>orientar todas as escolhas relacionadas ao desenvolvimento, integração, otimização e expansão <text:tab/>do Ignis.</text:p>
      <text:p text:style-name="P8"><text:tab/>Nenhuma funcionalidade, módulo, integração ou alteração arquitetural poderá contrariar <text:tab/>qualquer um dos princípios estabelecidos neste documento, salvo mediante revisão formal desta <text:tab/>Constituição Arquitetural.</text:p>
      <text:p text:style-name="P8"><text:tab/>Todos os componentes da plataforma, incluindo mecanismos de Inteligência Artificial, motores <text:tab/>de execução, módulos de investigação e futuras extensões, deverão respeitar integralmente os <text:tab/>princípios aqui definidos.</text:p>
      <text:h text:style-name="P9" text:outline-level="2"/>
      <text:h text:style-name="P9" text:outline-level="2">Princípio 0 – Princípio Fundamental</text:h>
      <text:p text:style-name="P8"><text:tab/>O Ignis não executa um conjunto fixo de testes.</text:p>
      <text:p text:style-name="P8"><text:tab/>O Ignis compreende o ambiente investigado, formula hipóteses, conduz investigações <text:tab/>adaptativas e somente conclui uma análise quando todas as evidências necessárias forem <text:tab/>coletadas, validadas e consideradas suficientes para sustentar tecnicamente suas conclusões.</text:p>
      <text:h text:style-name="P9" text:outline-level="2"><text:soft-page-break/></text:h>
      <text:h text:style-name="P9" text:outline-level="2">Princípio 1 – A IA pensa.</text:h>
      <text:p text:style-name="P8"><text:tab/>A Inteligência Artificial atua como Analista Principal da investigação.</text:p>
      <text:p text:style-name="P8"><text:tab/>Compete à IA interpretar evidências, identificar padrões, formular hipóteses, definir trilhas de <text:tab/>investigação, solicitar novas validações e conduzir o processo investigativo até que exista <text:tab/>confiança suficiente para a emissão de uma conclusão.</text:p>
      <text:h text:style-name="P9" text:outline-level="2"/>
      <text:h text:style-name="P9" text:outline-level="2">Princípio 2 – O Ignis executa.</text:h>
      <text:p text:style-name="P8"><text:tab/>O Ignis é responsável pela execução controlada de todas as ações operacionais.</text:p>
      <text:p text:style-name="P8"><text:tab/>Compete à plataforma validar escopo, controlar permissões, executar ações autorizadas, <text:tab/>registrar evidências, garantir rastreabilidade e preservar a integridade de toda a investigação.</text:p>
      <text:h text:style-name="P9" text:outline-level="2"/>
      <text:h text:style-name="P9" text:outline-level="2">Princípio 3 – Toda conclusão deve ser sustentada por evidências.</text:h>
      <text:p text:style-name="P8"><text:tab/>Nenhum achado poderá ser produzido por suposição, inferência isolada ou presunção.</text:p>
      <text:p text:style-name="P8"><text:tab/>Toda conclusão deverá estar vinculada a evidências técnicas coletadas durante a investigação, <text:tab/>permitindo sua validação, reprodução e auditoria a qualquer momento.</text:p>
      <text:p text:style-name="P10"><text:span text:style-name="Strong_20_Emphasis"><text:span text:style-name="T2">Princípio 4 – A investigação é adaptativa.</text:span></text:span></text:p>
      <text:p text:style-name="P11">O processo investigativo não é definido previamente por um fluxo rígido e imutável.</text:p>
      <text:p text:style-name="P12">Embora determinadas fases técnicas possam ser recorrentes em um domínio específico, as trilhas de investigação deverão ser construídas, expandidas, encerradas ou replanejadas dinamicamente conforme novas evidências forem coletadas, novas hipóteses forem formuladas e o ambiente investigado passar a ser compreendido pela Inteligência Artificial.</text:p>
      <text:p text:style-name="P13"/>
      <text:p text:style-name="P14">Modelo de Investigação</text:p>
      <text:p text:style-name="P14"/>
      <text:p text:style-name="P15"><text:tab/><text:span text:style-name="T2">O Ignis adota um modelo de investigação adaptativo, inspirado no raciocínio de <text:tab/>um analista de segurança experiente.</text:span></text:p>
      <text:p text:style-name="P16"><text:tab/>Diferentemente das abordagens tradicionais, baseadas em pipelines fixos e <text:tab/>sequências pré-definidas de ferramentas, o Ignis permite que a Inteligência <text:tab/>Artificial compreenda o ambiente investigado, identifique os ativos presentes e <text:tab/>construa dinamicamente as trilhas de investigação mais adequadas.</text:p>
      <text:p text:style-name="P16"><text:tab/>O operador informa apenas quatro elementos fundamentais:</text:p>
      <text:list text:style-name="L1">
        <text:list-item>
          <text:list>
            <text:list-item>
              <text:p text:style-name="P17"><text:span text:style-name="Strong_20_Emphasis"><text:span text:style-name="T2">Projeto</text:span></text:span><text:span text:style-name="T2"> — Contexto da avaliação de segurança. </text:span></text:p>
            </text:list-item>
            <text:list-item>
              <text:p text:style-name="P17"><text:soft-page-break/><text:span text:style-name="Strong_20_Emphasis"><text:span text:style-name="T2">Escopo</text:span></text:span><text:span text:style-name="T2"> — Limites autorizados da investigação. </text:span></text:p>
            </text:list-item>
            <text:list-item>
              <text:p text:style-name="P17"><text:span text:style-name="Strong_20_Emphasis"><text:span text:style-name="T2">Modo</text:span></text:span><text:span text:style-name="T2"> — Pentest ou Red Team. </text:span></text:p>
            </text:list-item>
            <text:list-item>
              <text:p text:style-name="P18"><text:span text:style-name="Strong_20_Emphasis"><text:span text:style-name="T2">Domínio</text:span></text:span><text:span text:style-name="T2"> — Ambiente a ser avaliado (Web, Internal Network, Wireless, API, Cloud, Mobile, etc.). </text:span></text:p>
            </text:list-item>
          </text:list>
        </text:list-item>
      </text:list>
      <text:p text:style-name="P19">A partir dessas informações, o WhiteRabbitNeo inicia uma fase de descoberta e entendimento do ambiente. Durante essa etapa, a IA identifica os ativos, tecnologias, serviços, protocolos e componentes presentes no escopo.</text:p>
      <text:p text:style-name="P20"><text:span text:style-name="T2">Cada elemento identificado pode originar uma ou mais </text:span><text:span text:style-name="Strong_20_Emphasis"><text:span text:style-name="T2">Trilhas de Investigação</text:span></text:span><text:span text:style-name="T2">, que representam linhas independentes de análise técnica.</text:span></text:p>
      <text:p text:style-name="P19">As trilhas não são previamente programadas. Elas surgem conforme a IA compreende o ambiente.</text:p>
      <text:p text:style-name="P19">Durante toda a investigação, o WhiteRabbitNeo pode solicitar novas coletas de evidências, validar hipóteses, descartar falsas premissas e abrir novas trilhas sempre que identificar informações relevantes.</text:p>
      <text:p text:style-name="P19">O processo somente é encerrado quando a IA considera possuir evidências suficientes para sustentar suas conclusões.</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25T20:44:16.941402081</meta:creation-date>
    <dc:date>2026-06-25T21:38:46.073688180</dc:date>
    <meta:editing-duration>PT44M2S</meta:editing-duration>
    <meta:editing-cycles>6</meta:editing-cycles>
    <meta:generator>LibreOffice/26.2.4.2$Linux_X86_64 LibreOffice_project/620$Build-2</meta:generator>
    <meta:document-statistic meta:table-count="0" meta:image-count="0" meta:object-count="0" meta:page-count="3" meta:paragraph-count="40" meta:word-count="616" meta:character-count="4693" meta:non-whitespace-character-count="4069"/>
  </office:meta>
</office:document-meta>
</file>