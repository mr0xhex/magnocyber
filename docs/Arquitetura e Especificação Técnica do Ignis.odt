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GNIS FRAMEWORK</text:p>
      <text:p text:style-name="Text_20_body">01 - Arquitetura do Ignis</text:p>
      <text:p text:style-name="Text_20_body">Objetivo</text:p>
      <text:p text:style-name="Text_20_body">Este documento define a arquitetura lógica da plataforma Ignis, descrevendo seus componentes, responsabilidades, relacionamentos e fluxo operacional.</text:p>
      <text:p text:style-name="Text_20_body">Este documento complementa a Constituição do Ignis e deve respeitar integralmente todos os princípios definidos naquele documento.</text:p>
      <text:list text:style-name="L1">
        <text:list-item>
          <text:p text:style-name="P1">Visão Arquitetural</text:p>
        </text:list-item>
      </text:list>
      <text:p text:style-name="Text_20_body">O Ignis é composto por um conjunto de camadas independentes e especializadas que trabalham de forma coordenada para conduzir investigações adaptativas em Offensive Security.</text:p>
      <text:p text:style-name="Text_20_body">A arquitetura foi projetada para separar claramente:</text:p>
      <text:p text:style-name="Text_20_body">• Investigação<text:line-break/>• Execução<text:line-break/>• Evidências<text:line-break/>• Inteligência Artificial<text:line-break/>• Relatórios</text:p>
      <text:p text:style-name="Text_20_body">Essa separação permite evolução independente dos componentes sem comprometer os princípios fundamentais da plataforma.</text:p>
      <text:list text:style-name="L2">
        <text:list-item>
          <text:p text:style-name="P2">Componentes Principais</text:p>
        </text:list-item>
      </text:list>
      <text:p text:style-name="Text_20_body">A arquitetura do Ignis é composta pelos seguintes componentes:</text:p>
      <text:p text:style-name="Text_20_body">• Interface Layer<text:line-break/>• Investigation Layer<text:line-break/>• AI Layer<text:line-break/>• Execution Layer<text:line-break/>• Evidence Layer<text:line-break/>• Reporting Layer</text:p>
      <text:p text:style-name="Text_20_body">Cada componente possui responsabilidades específicas e bem definidas.</text:p>
      <text:list text:style-name="L3">
        <text:list-item>
          <text:p text:style-name="P3">Interface Layer</text:p>
        </text:list-item>
      </text:list>
      <text:p text:style-name="Text_20_body">Responsável pela interação com o operador.</text:p>
      <text:p text:style-name="Text_20_body">Funções:</text:p>
      <text:p text:style-name="Text_20_body">• Criação de projetos<text:line-break/>• Definição de escopo<text:line-break/>• Seleção de modo<text:line-break/>• Seleção de domínio<text:line-break/>• Visualização de trilhas<text:line-break/><text:soft-page-break/>• Consulta de evidências<text:line-break/>• Geração de relatórios</text:p>
      <text:list text:style-name="L4">
        <text:list-item>
          <text:p text:style-name="P4">Investigation Layer</text:p>
        </text:list-item>
      </text:list>
      <text:p text:style-name="Text_20_body">Núcleo lógico da plataforma.</text:p>
      <text:p text:style-name="Text_20_body">Responsável por:</text:p>
      <text:p text:style-name="Text_20_body">• Gerenciamento de trilhas<text:line-break/>• Gerenciamento de hipóteses<text:line-break/>• Controle do ciclo investigativo<text:line-break/>• Consolidação de conclusões</text:p>
      <text:list text:style-name="L5">
        <text:list-item>
          <text:p text:style-name="P5">AI Layer</text:p>
        </text:list-item>
      </text:list>
      <text:p text:style-name="Text_20_body">Responsável por prover capacidade analítica à plataforma.</text:p>
      <text:p text:style-name="Text_20_body">Funções:</text:p>
      <text:p text:style-name="Text_20_body">• Interpretação de evidências<text:line-break/>• Formulação de hipóteses<text:line-break/>• Correlação de informações<text:line-break/>• Planejamento investigativo<text:line-break/>• Definição dos próximos passos</text:p>
      <text:list text:style-name="L6">
        <text:list-item>
          <text:p text:style-name="P6">Execution Layer</text:p>
        </text:list-item>
      </text:list>
      <text:p text:style-name="Text_20_body">Responsável pela execução controlada de ações operacionais.</text:p>
      <text:p text:style-name="Text_20_body">Funções:</text:p>
      <text:p text:style-name="Text_20_body">• Execução de ferramentas<text:line-break/>• Controle de permissões<text:line-break/>• Validação de escopo<text:line-break/>• Coleta de dados</text:p>
      <text:list text:style-name="L7">
        <text:list-item>
          <text:p text:style-name="P7">Evidence Layer</text:p>
        </text:list-item>
      </text:list>
      <text:p text:style-name="Text_20_body">Responsável pelo armazenamento e gerenciamento das evidências.</text:p>
      <text:p text:style-name="Text_20_body">Funções:</text:p>
      <text:p text:style-name="Text_20_body">• Persistência<text:line-break/>• Indexação<text:line-break/>• Auditoria<text:line-break/>• Cadeia de custódia</text:p>
      <text:list text:style-name="L8">
        <text:list-item>
          <text:p text:style-name="P8">Reporting Layer</text:p>
        </text:list-item>
      </text:list>
      <text:p text:style-name="Text_20_body">Responsável pela consolidação dos resultados da investigação.</text:p>
      <text:p text:style-name="Text_20_body">Funções:</text:p>
      <text:p text:style-name="Text_20_body"><text:soft-page-break/>• Consolidação de evidências<text:line-break/>• Geração de relatórios<text:line-break/>• Exportação de resultados<text:line-break/>• Registro histórico</text:p>
      <text:list text:style-name="L9">
        <text:list-item>
          <text:p text:style-name="P9">Fluxo Arquitetural</text:p>
        </text:list-item>
      </text:list>
      <text:p text:style-name="Text_20_body">Projeto<text:line-break/>↓<text:line-break/>Escopo<text:line-break/>↓<text:line-break/>Descoberta<text:line-break/>↓<text:line-break/>Investigação<text:line-break/>↓<text:line-break/>Coleta de Evidências<text:line-break/>↓<text:line-break/>Validação<text:line-break/>↓<text:line-break/>Conclusão<text:line-break/>↓<text:line-break/>Relatório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16:29:07.670794170</meta:creation-date>
    <meta:generator>LibreOffice/26.2.4.2$Linux_X86_64 LibreOffice_project/620$Build-2</meta:generator>
    <dc:date>2026-06-26T16:33:26.713563783</dc:date>
    <meta:editing-duration>PT4M19S</meta:editing-duration>
    <meta:editing-cycles>1</meta:editing-cycles>
    <meta:document-statistic meta:table-count="0" meta:image-count="0" meta:object-count="0" meta:page-count="3" meta:paragraph-count="40" meta:word-count="328" meta:character-count="2279" meta:non-whitespace-character-count="2000"/>
  </office:meta>
</office:document-meta>
</file>